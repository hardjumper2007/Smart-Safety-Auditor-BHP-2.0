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ceff" officeooo:paragraph-rsid="0014ceff"/>
    </style:style>
    <style:style style:name="T1" style:family="text">
      <style:text-properties officeooo:rsid="0014ce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a: 21.04.2026</text:p>
      <text:p text:style-name="Standard">Temat dnia: Przebudowa Settings, eksport PDF, <text:span text:style-name="T1">analiza obrazu</text:span></text:p>
      <text:p text:style-name="Standard"/>
      <text:p text:style-name="Standard">W dniu dzisiejszym pracowałem cały dzień zgodnie z wymaganiami praktyk.</text:p>
      <text:p text:style-name="Standard"/>
      <text:p text:style-name="Standard">Co udało się zrobić:</text:p>
      <text:p text:style-name="P1">Poprawiono analizę od teraz działa i każda analiza jest zapisywana w historii</text:p>
      <text:p text:style-name="Standard">SettingsPage - pełna przebudowa komponentu:</text:p>
      <text:p text:style-name="Standard">- Naprawiono switch trybu ciemnego - teraz używa colors.accent i zmienia kolor na różowy/żółty/zielony zgodnie z hue</text:p>
      <text:p text:style-name="Standard">- Dodano dynamiczny sliderKnob z animacją translateX</text:p>
      <text:p text:style-name="Standard">- Stylowanie inline nadpisuje CSS żeby kolor akcentu działał wszędzie</text:p>
      <text:p text:style-name="Standard"/>
      <text:p text:style-name="Standard">Eksport PDF z raportów BHP:</text:p>
      <text:p text:style-name="Standard">- Zaimplementowano generowanie PDF w AnalysisResultPage i HistoryPage przez jsPDF</text:p>
      <text:p text:style-name="Standard">- Dodano obsługę polskich znaków przez font Roboto + fallback na ASCII żeby nie było U r a z</text:p>
      <text:p text:style-name="Standard">- PDF zawiera: nagłówek, datę, normę, podsumowanie, zagrożenia, niezgodności, zalecenia, klauzule ISO</text:p>
      <text:p text:style-name="Standard">- W HistoryPage dodano endpoint /api/audit/{id} żeby dociągać pełne dane przed eksportem</text:p>
      <text:p text:style-name="Standard">- Przycisk PDF na każdej karcie w historii z e.stopPropagation() i stanem exportingId dla loadingu</text:p>
      <text:p text:style-name="Standard"/>
      <text:p text:style-name="Standard">Naprawa TypeScript:</text:p>
      <text:p text:style-name="Standard">- Dodano interfejs Hazard i otypowano wszystkie callbacki: (h: Hazard, i: number), (item: string, i: number)</text:p>
      <text:p text:style-name="Standard">- Wyeliminowano błędy Parameter 'h' implicitly has an 'any' type przez ?? [] przed .length i .forEach</text:p>
      <text:p text:style-name="P1">Poprawiono responsywność aplikacji</text:p>
      <text:p text:style-name="Standard"/>
      <text:p text:style-name="Standard">Problemy, które miałem:</text:p>
      <text:p text:style-name="Standard">- <text:span text:style-name="T1">analiza nie działała przez to że w plikach dockera i backendu był inny model + nie byłem zalogowany do ollama co do wersji cloud jest wymagane</text:span></text:p>
      <text:p text:style-name="Standard">- PDF z krzakami - brak glifów dla polskich znaków. Naprawione przez Roboto + fallback ASCII</text:p>
      <text:p text:style-name="Standard">- Brak danych w PDF z historii - konieczne dodanie /api/audit/{audit_id}</text:p>
      <text:p text:style-name="Standard">- TypeScript błędy any - naprawione przez interface Hazard</text:p>
      <text:p text:style-name="Standard">- Responsywność - przepisana na mobile-first</text:p>
      <text:p text:style-name="Standard">- Fonty w PDF - addFont() z CDN niestabilny, fallback zastosowany</text:p>
      <text:p text:style-name="Standard"/>
      <text:p text:style-name="Standard">To wszystk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Style" style:family="paragraph">
      <style:text-properties style:font-name="Arial" fo:font-family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21T12:50:54.062749000</dc:date>
    <meta:editing-duration>PT2M57S</meta:editing-duration>
    <meta:editing-cycles>1</meta:editing-cycles>
    <meta:document-statistic meta:table-count="0" meta:image-count="0" meta:object-count="0" meta:page-count="1" meta:paragraph-count="27" meta:word-count="271" meta:character-count="1783" meta:non-whitespace-character-count="1539"/>
  </office:meta>
</office:document-meta>
</file>